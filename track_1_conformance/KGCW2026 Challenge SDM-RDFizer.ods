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46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9583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ta1" style:family="table" style:master-page-name="PageStyle_5f_Participation_20_Details">
      <style:table-properties table:display="true" style:writing-mode="lr-tb"/>
    </style:style>
    <style:style style:name="ta2" style:family="table" style:master-page-name="PageStyle_5f_RML-Core">
      <style:table-properties table:display="true" style:writing-mode="lr-tb"/>
    </style:style>
    <style:style style:name="ta3" style:family="table" style:master-page-name="PageStyle_5f_RML-IO">
      <style:table-properties table:display="true" style:writing-mode="lr-tb"/>
    </style:style>
    <style:style style:name="ta4" style:family="table" style:master-page-name="PageStyle_5f_RML-CC">
      <style:table-properties table:display="true" style:writing-mode="lr-tb"/>
    </style:style>
    <style:style style:name="ta5" style:family="table" style:master-page-name="PageStyle_5f_RML-FNML">
      <style:table-properties table:display="true" style:writing-mode="lr-tb"/>
    </style:style>
    <style:style style:name="ta6" style:family="table" style:master-page-name="PageStyle_5f_RML-LV">
      <style:table-properties table:display="true" style:writing-mode="lr-tb"/>
    </style:style>
    <style:style style:name="ta7" style:family="table" style:master-page-name="PageStyle_5f_Track_20_2_20_Performance_20_OLD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Participation Details'.G7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tion Detail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Enrique Iglesias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6" office:value-type="string" calcext:value-type="string">
            <text:p><text:a xlink:href="mailto:iglesias@l3s.de" xlink:type="simple">iglesias@l3s.de</text:a>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2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SDM-RDFizer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5" table:number-columns-repeated="16"/>
          <table:table-cell table:number-columns-repeated="1005"/>
        </table:table-row>
        <table:table-row table:style-name="ro2">
          <table:table-cell table:style-name="ce4" table:number-columns-spanned="2" table:number-rows-spanned="1"/>
          <table:covered-table-cell/>
          <table:table-cell table:style-name="ce5" table:number-columns-repeated="17"/>
          <table:table-cell table:number-columns-repeated="1005"/>
        </table:table-row>
        <table:table-row table:style-name="ro1">
          <table:table-cell table:style-name="ce5" table:number-columns-repeated="5"/>
          <table:table-cell table:style-name="ce7" table:number-columns-repeated="3"/>
          <table:table-cell table:style-name="ce5" table:number-columns-repeated="11"/>
          <table:table-cell table:number-columns-repeated="1005"/>
        </table:table-row>
        <table:table-row table:style-name="ro1">
          <table:table-cell table:style-name="ce5" table:number-columns-repeated="5"/>
          <table:table-cell table:style-name="ce8"/>
          <table:table-cell table:style-name="ce9"/>
          <table:table-cell table:style-name="ce10"/>
          <table:table-cell table:style-name="ce5" table:number-columns-repeated="11"/>
          <table:table-cell table:number-columns-repeated="1005"/>
        </table:table-row>
        <table:table-row table:style-name="ro1">
          <table:table-cell table:style-name="ce5" table:number-columns-repeated="19"/>
          <table:table-cell table:number-columns-repeated="1005"/>
        </table:table-row>
        <table:table-row table:style-name="ro1" table:number-rows-repeated="56">
          <table:table-cell table:style-name="ce5" table:number-columns-repeated="5"/>
          <table:table-cell/>
          <table:table-cell table:style-name="ce5" table:number-columns-repeated="13"/>
          <table:table-cell table:number-columns-repeated="1005"/>
        </table:table-row>
        <table:table-row table:style-name="ro1">
          <table:table-cell table:style-name="ce5" table:number-columns-repeated="19"/>
          <table:table-cell table:number-columns-repeated="1005"/>
        </table:table-row>
        <table:table-row table:style-name="ro3" table:number-rows-repeated="499">
          <table:table-cell table:style-name="ce5" table:number-columns-repeated="19"/>
          <table:table-cell table:number-columns-repeated="1005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articipation Details'.G7:'Participation Details'.G7">
            <calcext:condition calcext:apply-style-name="ConditionalStyle_1" calcext:value="=&quot;PASS&quot;" calcext:base-cell-address="'Participation Details'.G7"/>
          </calcext:conditional-format>
          <calcext:conditional-format calcext:target-range-address="'Participation Details'.G7:'Participation Details'.G7">
            <calcext:condition calcext:apply-style-name="ConditionalStyle_2" calcext:value="=&quot;FAIL&quot;" calcext:base-cell-address="'Participation Details'.G7"/>
          </calcext:conditional-format>
        </calcext:conditional-formats>
      </table:table>
      <table:table table:name="RML-Core" table:style-name="ta2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21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21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Core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4" office:value-type="string" calcext:value-type="string">
            <text:p>RMLTC0000-JSON</text:p>
          </table:table-cell>
          <table:table-cell table:style-name="ce22" office:value-type="string" calcext:value-type="string">
            <text:p>PASS</text:p>
          </table:table-cell>
          <table:table-cell table:style-name="ce30"/>
          <table:table-cell table:style-name="ce5"/>
          <table:covered-table-cell table:number-columns-repeated="3"/>
          <table:table-cell table:style-name="ce5" table:number-columns-repeated="2"/>
          <table:table-cell table:style-name="ce7" table:number-columns-repeated="3"/>
          <table:table-cell table:style-name="ce5" table:number-columns-repeated="11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1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 table:style-name="ce8"/>
          <table:table-cell table:style-name="ce79"/>
          <table:table-cell table:style-name="ce10"/>
          <table:table-cell table:style-name="ce5" table:number-columns-repeated="11"/>
          <table:table-cell table:number-columns-repeated="1001"/>
        </table:table-row>
        <table:table-row table:style-name="ro2">
          <table:table-cell table:style-name="ce15" office:value-type="string" calcext:value-type="string">
            <text:p>RMLTC0001b-JSON</text:p>
          </table:table-cell>
          <table:table-cell table:style-name="ce22" office:value-type="string" calcext:value-type="string">
            <text:p>PASS</text:p>
          </table:table-cell>
          <table:table-cell table:style-name="ce32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15" office:value-type="string" calcext:value-type="string">
            <text:p>RMLTC0002a-JSON</text:p>
          </table:table-cell>
          <table:table-cell table:style-name="ce22" office:value-type="string" calcext:value-type="string">
            <text:p>PASS</text:p>
          </table:table-cell>
          <table:table-cell table:style-name="ce32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e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g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3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4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4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5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6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d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e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f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g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h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9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9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1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d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e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3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5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5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9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9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0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1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d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e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d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e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f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4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c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6a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6b-JSON</text:p>
          </table:table-cell>
          <table:table-cell table:style-name="ce22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6" office:value-type="string" calcext:value-type="string">
            <text:p>RMLTC0026c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6d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a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b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c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a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b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c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9a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a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b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c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d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e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f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1a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1b-JSON</text:p>
          </table:table-cell>
          <table:table-cell table:style-name="ce22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8" office:value-type="string" calcext:value-type="string">
            <text:p>RMLTC0031c-JSON</text:p>
          </table:table-cell>
          <table:table-cell table:style-name="ce22" office:value-type="string" calcext:value-type="string">
            <text:p>PASS</text:p>
          </table:table-cell>
          <table:table-cell table:style-name="ce34"/>
          <table:table-cell table:style-name="ce5" table:number-columns-repeated="20"/>
          <table:table-cell table:number-columns-repeated="1001"/>
        </table:table-row>
        <table:table-row table:style-name="ro3" table:number-rows-repeated="483">
          <table:table-cell table:style-name="ce8"/>
          <table:table-cell table:style-name="ce26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ore'.B3:'RML-Core'.B4 'RML-Core'.K7:'RML-Core'.K7 'RML-Core'.B6:'RML-Core'.B564">
            <calcext:condition calcext:apply-style-name="ConditionalStyle_1" calcext:value="=&quot;PASS&quot;" calcext:base-cell-address="'RML-Core'.B3"/>
          </calcext:conditional-format>
          <calcext:conditional-format calcext:target-range-address="'RML-Core'.B3:'RML-Core'.B4 'RML-Core'.K7:'RML-Core'.K7 'RML-Core'.B6:'RML-Core'.B564">
            <calcext:condition calcext:apply-style-name="ConditionalStyle_2" calcext:value="=&quot;FAIL&quot;" calcext:base-cell-address="'RML-Core'.B3"/>
          </calcext:conditional-format>
        </calcext:conditional-formats>
      </table:table>
      <table:table table:name="RML-IO" table:style-name="ta3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80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80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IO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1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1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2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2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2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table-cell table:style-name="ce10"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2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2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3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4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4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4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6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6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7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7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7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7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8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08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5">
          <table:table-cell table:style-name="ce6" office:value-type="string" calcext:value-type="string">
            <text:p>RMLSTC0009a</text:p>
          </table:table-cell>
          <table:table-cell table:style-name="ce80" office:value-type="string" calcext:value-type="string">
            <text:p>PASS</text:p>
          </table:table-cell>
          <table:table-cell table:style-name="ce31" office:value-type="string" calcext:value-type="string">
            <text:p>The quotes does not cause an error in Python</text:p>
          </table:table-cell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0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0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1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1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1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1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1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2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2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2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2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STC0012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0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1f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f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g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h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i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j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k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l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m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n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o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p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q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2r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3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f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4g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5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5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6a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6b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6c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6d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6e</text:p>
          </table:table-cell>
          <table:table-cell table:style-name="ce80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TC0007a</text:p>
          </table:table-cell>
          <table:table-cell table:style-name="ce80" office:value-type="string" calcext:value-type="string">
            <text:p>PASS</text:p>
          </table:table-cell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3" table:number-rows-repeated="500">
          <table:table-cell table:style-name="ce8"/>
          <table:table-cell table:style-name="ce81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4" table:number-rows-repeated="104799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IO'.B3:'RML-IO'.B4 'RML-IO'.B6:'RML-IO'.B578">
            <calcext:condition calcext:apply-style-name="ConditionalStyle_1" calcext:value="=&quot;PASS&quot;" calcext:base-cell-address="'RML-IO'.B3"/>
          </calcext:conditional-format>
          <calcext:conditional-format calcext:target-range-address="'RML-IO'.B3:'RML-IO'.B4 'RML-IO'.B6:'RML-IO'.B578">
            <calcext:condition calcext:apply-style-name="ConditionalStyle_2" calcext:value="=&quot;FAIL&quot;" calcext:base-cell-address="'RML-IO'.B3"/>
          </calcext:conditional-format>
        </calcext:conditional-formats>
      </table:table>
      <table:table table:name="RML-CC" table:style-name="ta4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83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83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CC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1-Alt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1-Bag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1-List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1-Seq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2-Bag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2-List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EB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EL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EL-BN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EL-Named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NEB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NEL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3-NELb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4-SM1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4-SM2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4-SM3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4-SM4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4-SM5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5-App1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5-App2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5-Car1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5-Car2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0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1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2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3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4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6-IT5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7-NES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8-ROMa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8-ROMb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9-DUP-Bag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09-DUP-List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10-Lista</text:p>
          </table:table-cell>
          <table:table-cell table:style-name="ce83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6" office:value-type="string" calcext:value-type="string">
            <text:p>RMLTC-CC-0010-Listb</text:p>
          </table:table-cell>
          <table:table-cell table:style-name="ce83" office:value-type="string" calcext:value-type="string">
            <text:p>PASS</text:p>
          </table:table-cell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3" table:number-rows-repeated="500">
          <table:table-cell table:style-name="ce8"/>
          <table:table-cell table:style-name="ce84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4" table:number-rows-repeated="10480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C'.B3:'RML-CC'.B4 'RML-CC'.B6:'RML-CC'.B540">
            <calcext:condition calcext:apply-style-name="ConditionalStyle_1" calcext:value="=&quot;PASS&quot;" calcext:base-cell-address="'RML-CC'.B3"/>
          </calcext:conditional-format>
          <calcext:conditional-format calcext:target-range-address="'RML-CC'.B3:'RML-CC'.B4 'RML-CC'.B6:'RML-CC'.B540">
            <calcext:condition calcext:apply-style-name="ConditionalStyle_2" calcext:value="=&quot;FAIL&quot;" calcext:base-cell-address="'RML-CC'.B3"/>
          </calcext:conditional-format>
        </calcext:conditional-formats>
      </table:table>
      <table:table table:name="RML-FNML" table:style-name="ta5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7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90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90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FNML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4" office:value-type="string" calcext:value-type="string">
            <text:p>RMLFNMLTC0002-CSV</text:p>
          </table:table-cell>
          <table:table-cell table:style-name="ce91" office:value-type="string" calcext:value-type="string">
            <text:p>PASS</text:p>
          </table:table-cell>
          <table:table-cell table:style-name="ce3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03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04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05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07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08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1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2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3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32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4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5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6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7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5" office:value-type="string" calcext:value-type="string">
            <text:p>RMLFNMLTC0081-CSV</text:p>
          </table:table-cell>
          <table:table-cell table:style-name="ce91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6" office:value-type="string" calcext:value-type="string">
            <text:p>RMLFNMLTC0101-CSV</text:p>
          </table:table-cell>
          <table:table-cell table:style-name="ce91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FNMLTC0102-CSV</text:p>
          </table:table-cell>
          <table:table-cell table:style-name="ce91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FNMLTC0103-CSV</text:p>
          </table:table-cell>
          <table:table-cell table:style-name="ce91" office:value-type="string" calcext:value-type="string">
            <text:p>PASS</text:p>
          </table:table-cell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8" office:value-type="string" calcext:value-type="string">
            <text:p>RMLFNMLTC0104-CSV</text:p>
          </table:table-cell>
          <table:table-cell table:style-name="ce91" office:value-type="string" calcext:value-type="string">
            <text:p>PASS</text:p>
          </table:table-cell>
          <table:table-cell table:style-name="ce34"/>
          <table:table-cell table:style-name="ce5" table:number-columns-repeated="20"/>
          <table:table-cell table:number-columns-repeated="1001"/>
        </table:table-row>
        <table:table-row table:style-name="ro3" table:number-rows-repeated="497">
          <table:table-cell table:style-name="ce8"/>
          <table:table-cell table:style-name="ce92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4" table:number-rows-repeated="10480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FNML'.B3:'RML-FNML'.B4 'RML-FNML'.B6:'RML-FNML'.B521">
            <calcext:condition calcext:apply-style-name="ConditionalStyle_1" calcext:value="=&quot;PASS&quot;" calcext:base-cell-address="'RML-FNML'.B3"/>
          </calcext:conditional-format>
          <calcext:conditional-format calcext:target-range-address="'RML-FNML'.B3:'RML-FNML'.B4 'RML-FNML'.B6:'RML-FNML'.B521">
            <calcext:condition calcext:apply-style-name="ConditionalStyle_2" calcext:value="=&quot;FAIL&quot;" calcext:base-cell-address="'RML-FNML'.B3"/>
          </calcext:conditional-format>
        </calcext:conditional-formats>
      </table:table>
      <table:table table:name="RML-LV" table:style-name="ta6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94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94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-LV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54" office:value-type="string" calcext:value-type="string">
            <text:p>RMLLVTC0000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0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0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1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1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1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1d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2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2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2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3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3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3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4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4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4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4d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5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5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5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d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e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6f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7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7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7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8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8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8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8d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9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9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09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10a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10b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10c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7" office:value-type="string" calcext:value-type="string">
            <text:p>RMLLVTC0010d</text:p>
          </table:table-cell>
          <table:table-cell table:style-name="ce95" office:value-type="string" calcext:value-type="string">
            <text:p>PASS</text:p>
          </table:table-cell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2">
          <table:table-cell table:style-name="ce48" office:value-type="string" calcext:value-type="string">
            <text:p>RMLLVTC0010e</text:p>
          </table:table-cell>
          <table:table-cell table:style-name="ce95" office:value-type="string" calcext:value-type="string">
            <text:p>PASS</text:p>
          </table:table-cell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3" table:number-rows-repeated="491">
          <table:table-cell table:style-name="ce8"/>
          <table:table-cell table:style-name="ce96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4" table:number-rows-repeated="10480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LV'.B3:'RML-LV'.B4 'RML-LV'.B6:'RML-LV'.B537">
            <calcext:condition calcext:apply-style-name="ConditionalStyle_1" calcext:value="=&quot;PASS&quot;" calcext:base-cell-address="'RML-LV'.B3"/>
          </calcext:conditional-format>
          <calcext:conditional-format calcext:target-range-address="'RML-LV'.B3:'RML-LV'.B4 'RML-LV'.B6:'RML-LV'.B537">
            <calcext:condition calcext:apply-style-name="ConditionalStyle_2" calcext:value="=&quot;FAIL&quot;" calcext:base-cell-address="'RML-LV'.B3"/>
          </calcext:conditional-format>
        </calcext:conditional-formats>
      </table:table>
      <table:table table:name="Track 2 Performance OLD" table:style-name="ta7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NAME</text:p>
          </table:table-cell>
          <table:table-cell/>
          <table:table-cell table:style-name="ce11" office:value-type="string" calcext:value-type="string">
            <text:p>Dataset</text:p>
          </table:table-cell>
          <table:table-cell table:style-name="ce19" office:value-type="string" calcext:value-type="string">
            <text:p>PASS/FAIL</text:p>
          </table:table-cell>
          <table:table-cell table:style-name="ce11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6" office:value-type="string" calcext:value-type="string">
            <text:p>EMAIL</text:p>
          </table:table-cell>
          <table:table-cell/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2">
          <table:table-cell table:style-name="ce2"/>
          <table:table-cell table:style-name="ce3"/>
          <table:table-cell/>
          <table:table-cell table:style-name="ce13" office:value-type="string" calcext:value-type="string">
            <text:p>EXAMPLE-000</text:p>
          </table:table-cell>
          <table:table-cell table:style-name="ce98" office:value-type="string" calcext:value-type="string">
            <text:p>FAIL</text:p>
          </table:table-cell>
          <table:table-cell table:style-name="ce13" office:value-type="string" calcext:value-type="string">
            <text:p>Out of ti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ENGINE</text:p>
          </table:table-cell>
          <table:table-cell/>
          <table:table-cell table:style-name="ce13" office:value-type="string" calcext:value-type="string">
            <text:p>EXAMPLE-001</text:p>
          </table:table-cell>
          <table:table-cell table:style-name="ce98" office:value-type="string" calcext:value-type="string">
            <text:p>FAIL</text:p>
          </table:table-cell>
          <table:table-cell table:style-name="ce13" office:value-type="string" calcext:value-type="string">
            <text:p>Out of memory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 table:number-columns-spanned="2" table:number-rows-spanned="1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/>
          <table:table-cell table:style-name="ce13" office:value-type="string" calcext:value-type="string">
            <text:p>EXAMPLE-002</text:p>
          </table:table-cell>
          <table:table-cell table:style-name="ce98" office:value-type="string" calcext:value-type="string">
            <text:p>PASS</text:p>
          </table:table-cell>
          <table:table-cell table:style-name="ce29" office:value-type="string" calcext:value-type="string">
            <text:p>Used CSV instead of SQL because engine did not support SQL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record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7">
          <table:table-cell table:style-name="ce4" office:value-type="string" calcext:value-type="string" table:number-columns-spanned="2" table:number-rows-spanned="1">
            <text:p>For FAIL you must provide why in the Comment column.</text:p>
          </table:table-cell>
          <table:covered-table-cell/>
          <table:table-cell/>
          <table:table-cell table:style-name="ce13" office:value-type="string" calcext:value-type="string">
            <text:p>10K_rows_20_columns</text:p>
          </table:table-cell>
          <table:table-cell table:style-name="ce98"/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100K_rows_20_columns</text:p>
          </table:table-cell>
          <table:table-cell table:style-name="ce98"/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properti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1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1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3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duplicated-valu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empty-valu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1-1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1-N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2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N-1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5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20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N-M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gtfs-madrid-bench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file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mixed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nested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tabular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0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3" table:number-rows-repeated="928">
          <table:table-cell table:number-columns-repeated="3"/>
          <table:table-cell table:style-name="ce61"/>
          <table:table-cell table:style-name="ce63"/>
          <table:table-cell table:style-name="ce61"/>
          <table:table-cell table:number-columns-repeated="101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1" calcext:value="=&quot;PASS&quot;" calcext:base-cell-address="'Track 2 Performance OLD'.E3"/>
          </calcext:conditional-format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2" calcext:value="=&quot;FAIL&quot;" calcext:base-cell-address="'Track 2 Performance OLD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7:07:45.451295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_20_Details" style:display-name="PageStyle_Participation 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ore" style:display-name="PageStyle_RML-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IO" style:display-name="PageStyle_RML-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C" style:display-name="PageStyle_RML-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FNML" style:display-name="PageStyle_RML-FNM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LV" style:display-name="PageStyle_RML-L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k_20_2_20_Performance_20_OLD" style:display-name="PageStyle_Track 2 Performance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04T17:09:46.953169722</dc:date>
    <meta:editing-duration>PT2M1S</meta:editing-duration>
    <meta:editing-cycles>2</meta:editing-cycles>
    <meta:document-statistic meta:table-count="7" meta:cell-count="639" meta:object-count="0"/>
  </office:meta>
</office:document-meta>
</file>