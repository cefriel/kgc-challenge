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33cm"/>
    </style:style>
    <style:style style:name="co4" style:family="table-column">
      <style:table-column-properties fo:break-before="auto" style:column-width="9.179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4.6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4.974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ta1" style:family="table" style:master-page-name="PageStyle_5f_Participation_20_Details">
      <style:table-properties table:display="true" style:writing-mode="lr-tb"/>
    </style:style>
    <style:style style:name="ta2" style:family="table" style:master-page-name="PageStyle_5f_RML-Core">
      <style:table-properties table:display="true" style:writing-mode="lr-tb"/>
    </style:style>
    <style:style style:name="ta3" style:family="table" style:master-page-name="PageStyle_5f_RML-IO">
      <style:table-properties table:display="true" style:writing-mode="lr-tb"/>
    </style:style>
    <style:style style:name="ta4" style:family="table" style:master-page-name="PageStyle_5f_RML-CC">
      <style:table-properties table:display="true" style:writing-mode="lr-tb"/>
    </style:style>
    <style:style style:name="ta5" style:family="table" style:master-page-name="PageStyle_5f_RML-FNML">
      <style:table-properties table:display="true" style:writing-mode="lr-tb"/>
    </style:style>
    <style:style style:name="ta6" style:family="table" style:master-page-name="PageStyle_5f_RML-LV">
      <style:table-properties table:display="true" style:writing-mode="lr-tb"/>
    </style:style>
    <style:style style:name="ta7" style:family="table" style:master-page-name="PageStyle_5f_Track_20_2_20_Performance_20_OLD">
      <style:table-properties table:display="false" style:writing-mode="lr-tb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Participation Details'.G7"/>
    </style:style>
    <style:style style:name="ce1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IO'.B3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IO'.B3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C'.B3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C'.B3"/>
    </style:style>
    <style:style style:name="ce1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Track 2 Performance OLD'.E3"/>
    </style:style>
    <style:style style:name="ce1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Track 2 Performance OLD'.E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icipation Detail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04" office:value-type="string" calcext:value-type="string">
            <text:p>Participant:</text:p>
          </table:table-cell>
          <table:table-cell table:style-name="ce106" office:value-type="string" calcext:value-type="string">
            <text:p>Jakub Duchateau, Christophe Debruyne</text:p>
          </table:table-cell>
          <table:table-cell table:style-name="ce106"/>
          <table:table-cell table:style-name="ce108" table:number-columns-repeated="16"/>
          <table:table-cell table:number-columns-repeated="1005"/>
        </table:table-row>
        <table:table-row table:style-name="ro2">
          <table:table-cell table:style-name="ce104" office:value-type="string" calcext:value-type="string">
            <text:p>Email:</text:p>
          </table:table-cell>
          <table:table-cell table:style-name="ce109" office:value-type="string" calcext:value-type="string">
            <text:p><text:a xlink:href="mailto:jakub.duchateau@uliege.be" xlink:type="simple">jakub.duchateau@uliege.be</text:a></text:p>
          </table:table-cell>
          <table:table-cell table:style-name="ce106"/>
          <table:table-cell table:style-name="ce108" table:number-columns-repeated="16"/>
          <table:table-cell table:number-columns-repeated="1005"/>
        </table:table-row>
        <table:table-row table:style-name="ro2">
          <table:table-cell table:style-name="ce105" office:value-type="string" calcext:value-type="string">
            <text:p>Engine:</text:p>
          </table:table-cell>
          <table:table-cell table:style-name="ce106" office:value-type="string" calcext:value-type="string">
            <text:p>BURP-Errors</text:p>
          </table:table-cell>
          <table:table-cell table:style-name="ce106"/>
          <table:table-cell table:style-name="ce108" table:number-columns-repeated="16"/>
          <table:table-cell table:number-columns-repeated="1005"/>
        </table:table-row>
        <table:table-row table:style-name="ro1">
          <table:table-cell table:style-name="ce106" office:value-type="string" calcext:value-type="string">
            <text:p>Version:</text:p>
          </table:table-cell>
          <table:table-cell table:style-name="ce106" office:value-type="string" calcext:value-type="string">
            <text:p>0.1.6</text:p>
          </table:table-cell>
          <table:table-cell table:style-name="ce106"/>
          <table:table-cell table:style-name="ce108" table:number-columns-repeated="16"/>
          <table:table-cell table:number-columns-repeated="1005"/>
        </table:table-row>
        <table:table-row table:style-name="ro2">
          <table:table-cell table:style-name="ce107" table:number-columns-spanned="2" table:number-rows-spanned="1"/>
          <table:covered-table-cell/>
          <table:table-cell table:style-name="ce108" table:number-columns-repeated="17"/>
          <table:table-cell table:number-columns-repeated="1005"/>
        </table:table-row>
        <table:table-row table:style-name="ro1">
          <table:table-cell table:style-name="ce108" table:number-columns-repeated="5"/>
          <table:table-cell table:style-name="ce110" table:number-columns-repeated="3"/>
          <table:table-cell table:style-name="ce108" table:number-columns-repeated="11"/>
          <table:table-cell table:number-columns-repeated="1005"/>
        </table:table-row>
        <table:table-row table:style-name="ro1">
          <table:table-cell table:style-name="ce108" table:number-columns-repeated="5"/>
          <table:table-cell table:style-name="ce111"/>
          <table:table-cell table:style-name="ce9"/>
          <table:table-cell table:style-name="ce113"/>
          <table:table-cell table:style-name="ce108" table:number-columns-repeated="11"/>
          <table:table-cell table:number-columns-repeated="1005"/>
        </table:table-row>
        <table:table-row table:style-name="ro1">
          <table:table-cell table:style-name="ce108" table:number-columns-repeated="19"/>
          <table:table-cell table:number-columns-repeated="1005"/>
        </table:table-row>
        <table:table-row table:style-name="ro1" table:number-rows-repeated="56">
          <table:table-cell table:style-name="ce108" table:number-columns-repeated="5"/>
          <table:table-cell/>
          <table:table-cell table:style-name="ce108" table:number-columns-repeated="13"/>
          <table:table-cell table:number-columns-repeated="1005"/>
        </table:table-row>
        <table:table-row table:style-name="ro1">
          <table:table-cell table:style-name="ce108" table:number-columns-repeated="19"/>
          <table:table-cell table:number-columns-repeated="1005"/>
        </table:table-row>
        <table:table-row table:style-name="ro3" table:number-rows-repeated="499">
          <table:table-cell table:style-name="ce108" table:number-columns-repeated="19"/>
          <table:table-cell table:number-columns-repeated="1005"/>
        </table:table-row>
        <table:table-row table:style-name="ro4" table:number-rows-repeated="104801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Participation Details'.G7:'Participation Details'.G7">
            <calcext:condition calcext:apply-style-name="ConditionalStyle_1" calcext:value="=&quot;PASS&quot;" calcext:base-cell-address="'Participation Details'.G7"/>
          </calcext:conditional-format>
          <calcext:conditional-format calcext:target-range-address="'Participation Details'.G7:'Participation Details'.G7">
            <calcext:condition calcext:apply-style-name="ConditionalStyle_2" calcext:value="=&quot;FAIL&quot;" calcext:base-cell-address="'Participation Details'.G7"/>
          </calcext:conditional-format>
        </calcext:conditional-formats>
      </table:table>
      <table:table table:name="RML-Core" table:style-name="ta2">
        <office:forms form:automatic-focus="false" form:apply-design-mode="false"/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114" office:value-type="string" calcext:value-type="string">
            <text:p>Test-case ID</text:p>
          </table:table-cell>
          <table:table-cell table:style-name="ce122" office:value-type="string" calcext:value-type="string">
            <text:p>PASS/FAIL</text:p>
          </table:table-cell>
          <table:table-cell table:style-name="ce127" office:value-type="string" calcext:value-type="string">
            <text:p>Comment</text:p>
          </table:table-cell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Example</text:p>
          </table:table-cell>
          <table:covered-table-cell table:style-name="ce123"/>
          <table:covered-table-cell table:style-name="ce128"/>
          <table:table-cell table:style-name="ce108"/>
          <table:table-cell table:style-name="ce1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0</text:p>
          </table:table-cell>
          <table:table-cell table:style-name="ce124" office:value-type="string" calcext:value-type="string">
            <text:p>PASS</text:p>
          </table:table-cell>
          <table:table-cell table:style-name="ce129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1</text:p>
          </table:table-cell>
          <table:table-cell table:style-name="ce124" office:value-type="string" calcext:value-type="string">
            <text:p>FAIL</text:p>
          </table:table-cell>
          <table:table-cell table:style-name="ce129" office:value-type="string" calcext:value-type="string">
            <text:p>Invalid output</text:p>
          </table:table-cell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RML Core</text:p>
          </table:table-cell>
          <table:covered-table-cell table:style-name="ce123"/>
          <table:covered-table-cell table:style-name="ce128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7" office:value-type="string" calcext:value-type="string">
            <text:p>RMLTC0000-JSON</text:p>
          </table:table-cell>
          <table:table-cell table:style-name="ce125" office:value-type="string" calcext:value-type="string">
            <text:p>PASS</text:p>
          </table:table-cell>
          <table:table-cell table:style-name="ce130"/>
          <table:table-cell table:style-name="ce108"/>
          <table:covered-table-cell table:number-columns-repeated="3"/>
          <table:table-cell table:style-name="ce108" table:number-columns-repeated="2"/>
          <table:table-cell table:style-name="ce110" table:number-columns-repeated="3"/>
          <table:table-cell table:style-name="ce108" table:number-columns-repeated="11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1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2"/>
          <table:table-cell table:style-name="ce111"/>
          <table:table-cell table:style-name="ce34"/>
          <table:table-cell table:style-name="ce113"/>
          <table:table-cell table:style-name="ce108" table:number-columns-repeated="11"/>
          <table:table-cell table:number-columns-repeated="1001"/>
        </table:table-row>
        <table:table-row table:style-name="ro2">
          <table:table-cell table:style-name="ce118" office:value-type="string" calcext:value-type="string">
            <text:p>RMLTC0001b-JSON</text:p>
          </table:table-cell>
          <table:table-cell table:style-name="ce125" office:value-type="string" calcext:value-type="string">
            <text:p>PASS</text:p>
          </table:table-cell>
          <table:table-cell table:style-name="ce132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18" office:value-type="string" calcext:value-type="string">
            <text:p>RMLTC0002a-JSON</text:p>
          </table:table-cell>
          <table:table-cell table:style-name="ce125" office:value-type="string" calcext:value-type="string">
            <text:p>PASS</text:p>
          </table:table-cell>
          <table:table-cell table:style-name="ce132"/>
          <table:table-cell table:style-name="ce108"/>
          <table:covered-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2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2e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2g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3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4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4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5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6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d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e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f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g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7h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8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8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8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9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09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0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0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0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1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2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2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2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2d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2e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3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5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5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9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19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0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1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2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2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2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2d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2e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3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3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3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3d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3e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3f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4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5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5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5c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6a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8" office:value-type="string" calcext:value-type="string">
            <text:p>RMLTC0026b-JSON</text:p>
          </table:table-cell>
          <table:table-cell table:style-name="ce12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19" office:value-type="string" calcext:value-type="string">
            <text:p>RMLTC0026c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6d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7a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7b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7c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8a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8b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8c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29a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0a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0b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0c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0d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0e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0f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1a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0" office:value-type="string" calcext:value-type="string">
            <text:p>RMLTC0031b-JSON</text:p>
          </table:table-cell>
          <table:table-cell table:style-name="ce125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21" office:value-type="string" calcext:value-type="string">
            <text:p>RMLTC0031c-JSON</text:p>
          </table:table-cell>
          <table:table-cell table:style-name="ce125" office:value-type="string" calcext:value-type="string">
            <text:p>PASS</text:p>
          </table:table-cell>
          <table:table-cell table:style-name="ce134"/>
          <table:table-cell table:style-name="ce108" table:number-columns-repeated="20"/>
          <table:table-cell table:number-columns-repeated="1001"/>
        </table:table-row>
        <table:table-row table:style-name="ro3" table:number-rows-repeated="483">
          <table:table-cell table:style-name="ce111"/>
          <table:table-cell table:style-name="ce126"/>
          <table:table-cell table:style-name="ce113"/>
          <table:table-cell table:style-name="ce108" table:number-columns-repeated="20"/>
          <table:table-cell table:number-columns-repeated="1001"/>
        </table:table-row>
        <table:table-row table:style-name="ro4" table:number-rows-repeated="104801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L-Core'.B3:'RML-Core'.B4 'RML-Core'.K7:'RML-Core'.K7 'RML-Core'.B6:'RML-Core'.B564">
            <calcext:condition calcext:apply-style-name="ConditionalStyle_1" calcext:value="=&quot;PASS&quot;" calcext:base-cell-address="'RML-Core'.B3"/>
          </calcext:conditional-format>
          <calcext:conditional-format calcext:target-range-address="'RML-Core'.B3:'RML-Core'.B4 'RML-Core'.K7:'RML-Core'.K7 'RML-Core'.B6:'RML-Core'.B564">
            <calcext:condition calcext:apply-style-name="ConditionalStyle_2" calcext:value="=&quot;FAIL&quot;" calcext:base-cell-address="'RML-Core'.B3"/>
          </calcext:conditional-format>
        </calcext:conditional-formats>
      </table:table>
      <table:table table:name="RML-IO" table:style-name="ta3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114" office:value-type="string" calcext:value-type="string">
            <text:p>Test-case ID</text:p>
          </table:table-cell>
          <table:table-cell table:style-name="ce122" office:value-type="string" calcext:value-type="string">
            <text:p>PASS/FAIL</text:p>
          </table:table-cell>
          <table:table-cell table:style-name="ce127" office:value-type="string" calcext:value-type="string">
            <text:p>Comment</text:p>
          </table:table-cell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Example</text:p>
          </table:table-cell>
          <table:covered-table-cell table:style-name="ce123"/>
          <table:covered-table-cell table:style-name="ce128"/>
          <table:table-cell table:style-name="ce108"/>
          <table:table-cell table:style-name="ce1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0</text:p>
          </table:table-cell>
          <table:table-cell table:style-name="ce35" office:value-type="string" calcext:value-type="string">
            <text:p>PASS</text:p>
          </table:table-cell>
          <table:table-cell table:style-name="ce129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1</text:p>
          </table:table-cell>
          <table:table-cell table:style-name="ce35" office:value-type="string" calcext:value-type="string">
            <text:p>FAIL</text:p>
          </table:table-cell>
          <table:table-cell table:style-name="ce129" office:value-type="string" calcext:value-type="string">
            <text:p>Invalid output</text:p>
          </table:table-cell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RML IO</text:p>
          </table:table-cell>
          <table:covered-table-cell table:style-name="ce123"/>
          <table:covered-table-cell table:style-name="ce128"/>
          <table:table-cell table:style-name="ce108"/>
          <table:covered-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1a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1b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2a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2b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2c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/>
          <table:table-cell table:style-name="ce113"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2d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/>
          <table: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2e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/>
          <table: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3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SPARQL automatic type conversion</text:p>
          </table:table-cell>
          <table:table-cell table:style-name="ce108"/>
          <table:table-cell table:number-columns-repeated="3"/>
          <table:table-cell table:style-name="ce108" table:number-columns-repeated="2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4a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4b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4c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6"/>
          <table:table-cell/>
          <table:table-cell table:style-name="ce108" table:number-columns-repeated="13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6a</text:p>
          </table:table-cell>
          <table:table-cell table:style-name="ce35" office:value-type="string" calcext:value-type="string">
            <text:p>PASS</text:p>
          </table:table-cell>
          <table:table-cell table:style-name="ce131" office:value-type="string" calcext:value-type="string">
            <text:p>Runner not able to run this test #147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6b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7a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7b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7c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7d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8a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8b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09a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Quoted columns in CSV are not an error #150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0a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0b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1a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JSONPath not RFC 9535 compliant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1b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JSONPath not RFC 9535 compliant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1c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JSONPath not RFC 9535 compliant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1d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JSONPath not RFC 9535 compliant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1e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JSONPath not RFC 9535 compliant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2a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2b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2c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2d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STC0012e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0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1a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1b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1c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1d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1e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1f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a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b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c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d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e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f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g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h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i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j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k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l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m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n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o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p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q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Datatype encoding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2r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3a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4a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Datatype mismatch #151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4b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4c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Datatype mismatch #151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4d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4e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Datatype mismatch #151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4f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Datatype mismatch #151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4g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Datatype mismatch #151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5a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5b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UTF-16 not implemented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6a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6b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Datatype mismatch #151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6c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Datatype mismatch #151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6d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Datatype mismatch #151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6e</text:p>
          </table:table-cell>
          <table:table-cell table:style-name="ce35" office:value-type="string" calcext:value-type="string">
            <text:p>FAIL</text:p>
          </table:table-cell>
          <table:table-cell table:style-name="ce131" office:value-type="string" calcext:value-type="string">
            <text:p>Datatype mismatch #151</text:p>
          </table:table-cell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TC0007a</text:p>
          </table:table-cell>
          <table:table-cell table:style-name="ce35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1" table:number-rows-repeated="5">
          <table:table-cell table:style-name="ce111"/>
          <table:table-cell table:style-name="ce36"/>
          <table:table-cell table:style-name="ce113"/>
          <table:table-cell table:style-name="ce108" table:number-columns-repeated="20"/>
          <table:table-cell table:number-columns-repeated="1001"/>
        </table:table-row>
        <table:table-row table:style-name="ro3" table:number-rows-repeated="495">
          <table:table-cell table:style-name="ce111"/>
          <table:table-cell table:style-name="ce36"/>
          <table:table-cell table:style-name="ce113"/>
          <table:table-cell table:style-name="ce108" table:number-columns-repeated="20"/>
          <table:table-cell table:number-columns-repeated="1001"/>
        </table:table-row>
        <table:table-row table:style-name="ro4" table:number-rows-repeated="104799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L-IO'.B3:'RML-IO'.B4 'RML-IO'.B6:'RML-IO'.B578">
            <calcext:condition calcext:apply-style-name="ConditionalStyle_1" calcext:value="=&quot;PASS&quot;" calcext:base-cell-address="'RML-IO'.B3"/>
          </calcext:conditional-format>
          <calcext:conditional-format calcext:target-range-address="'RML-IO'.B3:'RML-IO'.B4 'RML-IO'.B6:'RML-IO'.B578">
            <calcext:condition calcext:apply-style-name="ConditionalStyle_2" calcext:value="=&quot;FAIL&quot;" calcext:base-cell-address="'RML-IO'.B3"/>
          </calcext:conditional-format>
        </calcext:conditional-formats>
      </table:table>
      <table:table table:name="RML-CC" table:style-name="ta4">
        <office:forms form:automatic-focus="false" form:apply-design-mode="false"/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114" office:value-type="string" calcext:value-type="string">
            <text:p>Test-case ID</text:p>
          </table:table-cell>
          <table:table-cell table:style-name="ce122" office:value-type="string" calcext:value-type="string">
            <text:p>PASS/FAIL</text:p>
          </table:table-cell>
          <table:table-cell table:style-name="ce127" office:value-type="string" calcext:value-type="string">
            <text:p>Comment</text:p>
          </table:table-cell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Example</text:p>
          </table:table-cell>
          <table:covered-table-cell table:style-name="ce123"/>
          <table:covered-table-cell table:style-name="ce128"/>
          <table:table-cell table:style-name="ce108"/>
          <table:table-cell table:style-name="ce1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0</text:p>
          </table:table-cell>
          <table:table-cell table:style-name="ce37" office:value-type="string" calcext:value-type="string">
            <text:p>PASS</text:p>
          </table:table-cell>
          <table:table-cell table:style-name="ce129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1</text:p>
          </table:table-cell>
          <table:table-cell table:style-name="ce37" office:value-type="string" calcext:value-type="string">
            <text:p>FAIL</text:p>
          </table:table-cell>
          <table:table-cell table:style-name="ce129" office:value-type="string" calcext:value-type="string">
            <text:p>Invalid output</text:p>
          </table:table-cell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RML CC</text:p>
          </table:table-cell>
          <table:covered-table-cell table:style-name="ce123"/>
          <table:covered-table-cell table:style-name="ce128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1-Alt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1-Bag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1-List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1-Seq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2-Bag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/>
          <table:table-cell table:style-name="ce113"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2-List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3-EB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3-EL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3-EL-BN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3-EL-Named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3-NEB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3-NEL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3-NELb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4-SM1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4-SM2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4-SM3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4-SM4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4-SM5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5-App1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5-App2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5-Car1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5-Car2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6-IT0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6-IT1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6-IT2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6-IT3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6-IT4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6-IT5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7-NES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8-ROMa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8-ROMb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9-DUP-Bag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09-DUP-List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10-Lista</text:p>
          </table:table-cell>
          <table:table-cell table:style-name="ce37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09" office:value-type="string" calcext:value-type="string">
            <text:p>RMLTC-CC-0010-Listb</text:p>
          </table:table-cell>
          <table:table-cell table:style-name="ce37" office:value-type="string" calcext:value-type="string">
            <text:p>PASS</text:p>
          </table:table-cell>
          <table:table-cell table:style-name="ce141"/>
          <table:table-cell table:style-name="ce108" table:number-columns-repeated="20"/>
          <table:table-cell table:number-columns-repeated="1001"/>
        </table:table-row>
        <table:table-row table:style-name="ro3" table:number-rows-repeated="500">
          <table:table-cell table:style-name="ce111"/>
          <table:table-cell table:style-name="ce38"/>
          <table:table-cell table:style-name="ce113"/>
          <table:table-cell table:style-name="ce108" table:number-columns-repeated="20"/>
          <table:table-cell table:number-columns-repeated="1001"/>
        </table:table-row>
        <table:table-row table:style-name="ro4" table:number-rows-repeated="10480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L-CC'.B3:'RML-CC'.B4 'RML-CC'.B6:'RML-CC'.B540">
            <calcext:condition calcext:apply-style-name="ConditionalStyle_1" calcext:value="=&quot;PASS&quot;" calcext:base-cell-address="'RML-CC'.B3"/>
          </calcext:conditional-format>
          <calcext:conditional-format calcext:target-range-address="'RML-CC'.B3:'RML-CC'.B4 'RML-CC'.B6:'RML-CC'.B540">
            <calcext:condition calcext:apply-style-name="ConditionalStyle_2" calcext:value="=&quot;FAIL&quot;" calcext:base-cell-address="'RML-CC'.B3"/>
          </calcext:conditional-format>
        </calcext:conditional-formats>
      </table:table>
      <table:table table:name="RML-FNML" table:style-name="ta5">
        <office:forms form:automatic-focus="false" form:apply-design-mode="false"/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114" office:value-type="string" calcext:value-type="string">
            <text:p>Test-case ID</text:p>
          </table:table-cell>
          <table:table-cell table:style-name="ce122" office:value-type="string" calcext:value-type="string">
            <text:p>PASS/FAIL</text:p>
          </table:table-cell>
          <table:table-cell table:style-name="ce127" office:value-type="string" calcext:value-type="string">
            <text:p>Comment</text:p>
          </table:table-cell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Example</text:p>
          </table:table-cell>
          <table:covered-table-cell table:style-name="ce123"/>
          <table:covered-table-cell table:style-name="ce128"/>
          <table:table-cell table:style-name="ce108"/>
          <table:table-cell table:style-name="ce135" office:value-type="string" calcext:value-type="string" table:number-columns-spanned="3" table:number-rows-spanned="7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0</text:p>
          </table:table-cell>
          <table:table-cell table:style-name="ce45" office:value-type="string" calcext:value-type="string">
            <text:p>PASS</text:p>
          </table:table-cell>
          <table:table-cell table:style-name="ce129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1</text:p>
          </table:table-cell>
          <table:table-cell table:style-name="ce45" office:value-type="string" calcext:value-type="string">
            <text:p>FAIL</text:p>
          </table:table-cell>
          <table:table-cell table:style-name="ce129" office:value-type="string" calcext:value-type="string">
            <text:p>Invalid output</text:p>
          </table:table-cell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RML FNML</text:p>
          </table:table-cell>
          <table:covered-table-cell table:style-name="ce123"/>
          <table:covered-table-cell table:style-name="ce128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2" office:value-type="string" calcext:value-type="string">
            <text:p>RMLFNMLTC0002-CSV</text:p>
          </table:table-cell>
          <table:table-cell table:style-name="ce46" office:value-type="string" calcext:value-type="string">
            <text:p>PASS</text:p>
          </table:table-cell>
          <table:table-cell table:style-name="ce130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03-CSV</text:p>
          </table:table-cell>
          <table:table-cell table:style-name="ce46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04-CSV</text:p>
          </table:table-cell>
          <table:table-cell table:style-name="ce46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05-CSV</text:p>
          </table:table-cell>
          <table:table-cell table:style-name="ce46" office:value-type="string" calcext:value-type="string">
            <text:p>PASS</text:p>
          </table:table-cell>
          <table:table-cell table:style-name="ce131"/>
          <table:table-cell table:style-name="ce108"/>
          <table:table-cell table:style-name="ce113"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07-CSV</text:p>
          </table:table-cell>
          <table:table-cell table:style-name="ce46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08-CSV</text:p>
          </table:table-cell>
          <table:table-cell table:style-name="ce46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11-CSV</text:p>
          </table:table-cell>
          <table:table-cell table:style-name="ce46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21-CSV</text:p>
          </table:table-cell>
          <table:table-cell table:style-name="ce46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31-CSV</text:p>
          </table:table-cell>
          <table:table-cell table:style-name="ce46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32-CSV</text:p>
          </table:table-cell>
          <table:table-cell table:style-name="ce46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41-CSV</text:p>
          </table:table-cell>
          <table:table-cell table:style-name="ce46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51-CSV</text:p>
          </table:table-cell>
          <table:table-cell table:style-name="ce46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61-CSV</text:p>
          </table:table-cell>
          <table:table-cell table:style-name="ce46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71-CSV</text:p>
          </table:table-cell>
          <table:table-cell table:style-name="ce46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3" office:value-type="string" calcext:value-type="string">
            <text:p>RMLFNMLTC0081-CSV</text:p>
          </table:table-cell>
          <table:table-cell table:style-name="ce46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4" office:value-type="string" calcext:value-type="string">
            <text:p>RMLFNMLTC0101-CSV</text:p>
          </table:table-cell>
          <table:table-cell table:style-name="ce46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FNMLTC0102-CSV</text:p>
          </table:table-cell>
          <table:table-cell table:style-name="ce46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FNMLTC0103-CSV</text:p>
          </table:table-cell>
          <table:table-cell table:style-name="ce46" office:value-type="string" calcext:value-type="string">
            <text:p>PASS</text:p>
          </table:table-cell>
          <table:table-cell table:style-name="ce133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6" office:value-type="string" calcext:value-type="string">
            <text:p>RMLFNMLTC0104-CSV</text:p>
          </table:table-cell>
          <table:table-cell table:style-name="ce46" office:value-type="string" calcext:value-type="string">
            <text:p>PASS</text:p>
          </table:table-cell>
          <table:table-cell table:style-name="ce134"/>
          <table:table-cell table:style-name="ce108" table:number-columns-repeated="20"/>
          <table:table-cell table:number-columns-repeated="1001"/>
        </table:table-row>
        <table:table-row table:style-name="ro3" table:number-rows-repeated="497">
          <table:table-cell table:style-name="ce111"/>
          <table:table-cell table:style-name="ce47"/>
          <table:table-cell table:style-name="ce113"/>
          <table:table-cell table:style-name="ce108" table:number-columns-repeated="20"/>
          <table:table-cell table:number-columns-repeated="1001"/>
        </table:table-row>
        <table:table-row table:style-name="ro4" table:number-rows-repeated="104805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L-FNML'.B3:'RML-FNML'.B4 'RML-FNML'.B6:'RML-FNML'.B521">
            <calcext:condition calcext:apply-style-name="ConditionalStyle_1" calcext:value="=&quot;PASS&quot;" calcext:base-cell-address="'RML-FNML'.B3"/>
          </calcext:conditional-format>
          <calcext:conditional-format calcext:target-range-address="'RML-FNML'.B3:'RML-FNML'.B4 'RML-FNML'.B6:'RML-FNML'.B521">
            <calcext:condition calcext:apply-style-name="ConditionalStyle_2" calcext:value="=&quot;FAIL&quot;" calcext:base-cell-address="'RML-FNML'.B3"/>
          </calcext:conditional-format>
        </calcext:conditional-formats>
      </table:table>
      <table:table table:name="RML-LV" table:style-name="ta6">
        <office:forms form:automatic-focus="false" form:apply-design-mode="false"/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114" office:value-type="string" calcext:value-type="string">
            <text:p>Test-case ID</text:p>
          </table:table-cell>
          <table:table-cell table:style-name="ce122" office:value-type="string" calcext:value-type="string">
            <text:p>PASS/FAIL</text:p>
          </table:table-cell>
          <table:table-cell table:style-name="ce127" office:value-type="string" calcext:value-type="string">
            <text:p>Comment</text:p>
          </table:table-cell>
          <table:table-cell table:style-name="ce108" table:number-columns-repeated="20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Example</text:p>
          </table:table-cell>
          <table:covered-table-cell table:style-name="ce123"/>
          <table:covered-table-cell table:style-name="ce128"/>
          <table:table-cell table:style-name="ce108"/>
          <table:table-cell table:style-name="ce1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0</text:p>
          </table:table-cell>
          <table:table-cell table:style-name="ce49" office:value-type="string" calcext:value-type="string">
            <text:p>PASS</text:p>
          </table:table-cell>
          <table:table-cell table:style-name="ce129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6" office:value-type="string" calcext:value-type="string">
            <text:p>EXAMPLE-001</text:p>
          </table:table-cell>
          <table:table-cell table:style-name="ce49" office:value-type="string" calcext:value-type="string">
            <text:p>FAIL</text:p>
          </table:table-cell>
          <table:table-cell table:style-name="ce129" office:value-type="string" calcext:value-type="string">
            <text:p>Invalid output</text:p>
          </table:table-cell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1">
          <table:table-cell table:style-name="ce115" office:value-type="string" calcext:value-type="string" table:number-columns-spanned="3" table:number-rows-spanned="1">
            <text:p>RML-LV</text:p>
          </table:table-cell>
          <table:covered-table-cell table:style-name="ce123"/>
          <table:covered-table-cell table:style-name="ce128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50" office:value-type="string" calcext:value-type="string">
            <text:p>RMLLVTC0000a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0b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0c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1a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/>
          <table:covered-table-cell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1b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/>
          <table:table-cell table:style-name="ce113" table:number-columns-repeated="3"/>
          <table:table-cell table:style-name="ce108" table:number-columns-repeated="16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1c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1d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2a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2b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2c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3a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3b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3c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4a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4b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4c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4d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5a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5b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5c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6a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6b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6c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6d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6e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6f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7a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7b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7c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8a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8b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8c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8d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9a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9b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09c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10a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10b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10c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5" office:value-type="string" calcext:value-type="string">
            <text:p>RMLLVTC0010d</text:p>
          </table:table-cell>
          <table:table-cell table:style-name="ce50" office:value-type="string" calcext:value-type="string">
            <text:p>PASS</text:p>
          </table:table-cell>
          <table:table-cell table:style-name="ce131"/>
          <table:table-cell table:style-name="ce108" table:number-columns-repeated="20"/>
          <table:table-cell table:number-columns-repeated="1001"/>
        </table:table-row>
        <table:table-row table:style-name="ro2">
          <table:table-cell table:style-name="ce146" office:value-type="string" calcext:value-type="string">
            <text:p>RMLLVTC0010e</text:p>
          </table:table-cell>
          <table:table-cell table:style-name="ce50" office:value-type="string" calcext:value-type="string">
            <text:p>PASS</text:p>
          </table:table-cell>
          <table:table-cell table:style-name="ce141"/>
          <table:table-cell table:style-name="ce108" table:number-columns-repeated="20"/>
          <table:table-cell table:number-columns-repeated="1001"/>
        </table:table-row>
        <table:table-row table:style-name="ro3" table:number-rows-repeated="491">
          <table:table-cell table:style-name="ce111"/>
          <table:table-cell table:style-name="ce51"/>
          <table:table-cell table:style-name="ce113"/>
          <table:table-cell table:style-name="ce108" table:number-columns-repeated="20"/>
          <table:table-cell table:number-columns-repeated="1001"/>
        </table:table-row>
        <table:table-row table:style-name="ro4" table:number-rows-repeated="104803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L-LV'.B3:'RML-LV'.B4 'RML-LV'.B6:'RML-LV'.B537">
            <calcext:condition calcext:apply-style-name="ConditionalStyle_1" calcext:value="=&quot;PASS&quot;" calcext:base-cell-address="'RML-LV'.B3"/>
          </calcext:conditional-format>
          <calcext:conditional-format calcext:target-range-address="'RML-LV'.B3:'RML-LV'.B4 'RML-LV'.B6:'RML-LV'.B537">
            <calcext:condition calcext:apply-style-name="ConditionalStyle_2" calcext:value="=&quot;FAIL&quot;" calcext:base-cell-address="'RML-LV'.B3"/>
          </calcext:conditional-format>
        </calcext:conditional-formats>
      </table:table>
      <table:table table:name="Track 2 Performance OLD" table:style-name="ta7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04" office:value-type="string" calcext:value-type="string">
            <text:p>Participant:</text:p>
          </table:table-cell>
          <table:table-cell table:style-name="ce106" office:value-type="string" calcext:value-type="string">
            <text:p>NAME</text:p>
          </table:table-cell>
          <table:table-cell/>
          <table:table-cell table:style-name="ce114" office:value-type="string" calcext:value-type="string">
            <text:p>Dataset</text:p>
          </table:table-cell>
          <table:table-cell table:style-name="ce122" office:value-type="string" calcext:value-type="string">
            <text:p>PASS/FAIL</text:p>
          </table:table-cell>
          <table:table-cell table:style-name="ce114" office:value-type="string" calcext:value-type="string">
            <text:p>Comment</text:p>
          </table:table-cell>
          <table:table-cell table:number-columns-repeated="1018"/>
        </table:table-row>
        <table:table-row table:style-name="ro2">
          <table:table-cell table:style-name="ce104" office:value-type="string" calcext:value-type="string">
            <text:p>Email:</text:p>
          </table:table-cell>
          <table:table-cell table:style-name="ce109" office:value-type="string" calcext:value-type="string">
            <text:p>EMAIL</text:p>
          </table:table-cell>
          <table:table-cell/>
          <table:table-cell table:style-name="ce115" office:value-type="string" calcext:value-type="string" table:number-columns-spanned="3" table:number-rows-spanned="1">
            <text:p>example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2">
          <table:table-cell table:style-name="ce105"/>
          <table:table-cell table:style-name="ce106"/>
          <table:table-cell/>
          <table:table-cell table:style-name="ce116" office:value-type="string" calcext:value-type="string">
            <text:p>EXAMPLE-000</text:p>
          </table:table-cell>
          <table:table-cell table:style-name="ce53" office:value-type="string" calcext:value-type="string">
            <text:p>FAIL</text:p>
          </table:table-cell>
          <table:table-cell table:style-name="ce116" office:value-type="string" calcext:value-type="string">
            <text:p>Out of time</text:p>
          </table:table-cell>
          <table:table-cell table:number-columns-repeated="1018"/>
        </table:table-row>
        <table:table-row table:style-name="ro2">
          <table:table-cell table:style-name="ce105" office:value-type="string" calcext:value-type="string">
            <text:p>Engine:</text:p>
          </table:table-cell>
          <table:table-cell table:style-name="ce106" office:value-type="string" calcext:value-type="string">
            <text:p>ENGINE</text:p>
          </table:table-cell>
          <table:table-cell/>
          <table:table-cell table:style-name="ce116" office:value-type="string" calcext:value-type="string">
            <text:p>EXAMPLE-001</text:p>
          </table:table-cell>
          <table:table-cell table:style-name="ce53" office:value-type="string" calcext:value-type="string">
            <text:p>FAIL</text:p>
          </table:table-cell>
          <table:table-cell table:style-name="ce116" office:value-type="string" calcext:value-type="string">
            <text:p>Out of memory</text:p>
          </table:table-cell>
          <table:table-cell table:number-columns-repeated="1018"/>
        </table:table-row>
        <table:table-row table:style-name="ro5">
          <table:table-cell table:style-name="ce107" office:value-type="string" calcext:value-type="string" table:number-columns-spanned="2" table:number-rows-spanned="1">
            <text:p>Also provide the results by running the 'stats' command using the provided tool if your tool PASS for the dataset.</text:p>
            <text:p>In 'Track 2: Template' tab you can find a template to provide the necessary results, please use them for every dataset</text:p>
          </table:table-cell>
          <table:covered-table-cell/>
          <table:table-cell/>
          <table:table-cell table:style-name="ce116" office:value-type="string" calcext:value-type="string">
            <text:p>EXAMPLE-002</text:p>
          </table:table-cell>
          <table:table-cell table:style-name="ce53" office:value-type="string" calcext:value-type="string">
            <text:p>PASS</text:p>
          </table:table-cell>
          <table:table-cell table:style-name="ce129" office:value-type="string" calcext:value-type="string">
            <text:p>Used CSV instead of SQL because engine did not support SQL.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records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6">
          <table:table-cell table:style-name="ce107" office:value-type="string" calcext:value-type="string" table:number-columns-spanned="2" table:number-rows-spanned="1">
            <text:p>For FAIL you must provide why in the Comment column.</text:p>
          </table:table-cell>
          <table:covered-table-cell/>
          <table:table-cell/>
          <table:table-cell table:style-name="ce116" office:value-type="string" calcext:value-type="string">
            <text:p>10K_rows_20_columns</text:p>
          </table:table-cell>
          <table:table-cell table:style-name="ce53"/>
          <table:table-cell table:style-name="ce116"/>
          <table:table-cell table:number-columns-repeated="1018"/>
        </table:table-row>
        <table:table-row table:style-name="ro1">
          <table:table-cell table:number-columns-repeated="3"/>
          <table:table-cell table:style-name="ce116" office:value-type="string" calcext:value-type="string">
            <text:p>100K_rows_20_columns</text:p>
          </table:table-cell>
          <table:table-cell table:style-name="ce53"/>
          <table:table-cell table:style-name="ce116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M_rows_20_columns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0M_rows_20_columns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properties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M_rows_1_columns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M_rows_10_columns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M_rows_20_columns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M_rows_30_columns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duplicated-values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empty-values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joins_1-1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_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_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_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_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joins_1-N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0_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0_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0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0_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0_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5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15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-20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joins_N-1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1_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1_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1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1_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1_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1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5-1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20-1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joins_N-M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5_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5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5_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5_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5_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5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5_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10-5_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10_2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10_5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10_75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join_5-10_100percent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15" office:value-type="string" calcext:value-type="string" table:number-columns-spanned="3" table:number-rows-spanned="1">
            <text:p>gtfs-madrid-bench</text:p>
          </table:table-cell>
          <table:covered-table-cell table:style-name="ce123"/>
          <table:covered-table-cell table:style-name="ce128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heterogeneity_files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heterogeneity_mixed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heterogeneity_nested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heterogeneity_tabular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scale_1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scale_10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scale_100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1">
          <table:table-cell table:number-columns-repeated="3"/>
          <table:table-cell table:style-name="ce154" office:value-type="string" calcext:value-type="string">
            <text:p>scale_1000</text:p>
          </table:table-cell>
          <table:table-cell table:style-name="ce156"/>
          <table:table-cell table:style-name="ce154"/>
          <table:table-cell table:number-columns-repeated="1018"/>
        </table:table-row>
        <table:table-row table:style-name="ro3" table:number-rows-repeated="928">
          <table:table-cell table:number-columns-repeated="3"/>
          <table:table-cell table:style-name="ce154"/>
          <table:table-cell table:style-name="ce156"/>
          <table:table-cell table:style-name="ce154"/>
          <table:table-cell table:number-columns-repeated="101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Track 2 Performance OLD'.E3:'Track 2 Performance OLD'.E5 'Track 2 Performance OLD'.E7:'Track 2 Performance OLD'.E10 'Track 2 Performance OLD'.E12:'Track 2 Performance OLD'.E15 'Track 2 Performance OLD'.E17:'Track 2 Performance OLD'.E21 'Track 2 Performance OLD'.E23:'Track 2 Performance OLD'.E27 'Track 2 Performance OLD'.E29:'Track 2 Performance OLD'.E33 'Track 2 Performance OLD'.E35:'Track 2 Performance OLD'.E42 'Track 2 Performance OLD'.E44:'Track 2 Performance OLD'.E51 'Track 2 Performance OLD'.E53:'Track 2 Performance OLD'.E64 'Track 2 Performance OLD'.E66:'Track 2 Performance OLD'.E1001">
            <calcext:condition calcext:apply-style-name="ConditionalStyle_1" calcext:value="=&quot;PASS&quot;" calcext:base-cell-address="'Track 2 Performance OLD'.E3"/>
          </calcext:conditional-format>
          <calcext:conditional-format calcext:target-range-address="'Track 2 Performance OLD'.E3:'Track 2 Performance OLD'.E5 'Track 2 Performance OLD'.E7:'Track 2 Performance OLD'.E10 'Track 2 Performance OLD'.E12:'Track 2 Performance OLD'.E15 'Track 2 Performance OLD'.E17:'Track 2 Performance OLD'.E21 'Track 2 Performance OLD'.E23:'Track 2 Performance OLD'.E27 'Track 2 Performance OLD'.E29:'Track 2 Performance OLD'.E33 'Track 2 Performance OLD'.E35:'Track 2 Performance OLD'.E42 'Track 2 Performance OLD'.E44:'Track 2 Performance OLD'.E51 'Track 2 Performance OLD'.E53:'Track 2 Performance OLD'.E64 'Track 2 Performance OLD'.E66:'Track 2 Performance OLD'.E1001">
            <calcext:condition calcext:apply-style-name="ConditionalStyle_2" calcext:value="=&quot;FAIL&quot;" calcext:base-cell-address="'Track 2 Performance OLD'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ea99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 style:data-style-name="N2" text:time-value="09:31:11.1287807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rticipation_20_Details" style:display-name="PageStyle_Participation Detai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ML-Core" style:display-name="PageStyle_RML-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ML-IO" style:display-name="PageStyle_RML-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ML-CC" style:display-name="PageStyle_RML-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ML-FNML" style:display-name="PageStyle_RML-FNM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ML-LV" style:display-name="PageStyle_RML-L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ck_20_2_20_Performance_20_OLD" style:display-name="PageStyle_Track 2 Performance O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dc:date>2026-05-05T10:00:12.757973841</dc:date>
    <meta:editing-duration>PT25M17S</meta:editing-duration>
    <meta:editing-cycles>3</meta:editing-cycles>
    <meta:document-statistic meta:table-count="7" meta:cell-count="659" meta:object-count="0"/>
  </office:meta>
</office:document-meta>
</file>